
<file path=META-INF/manifest.xml><?xml version="1.0" encoding="utf-8"?>
<ns0:manifest xmlns:ns0="urn:oasis:names:tc:opendocument:xmlns:manifest:1.0">
  <ns0:file-entry ns0:media-type="application/vnd.oasis.opendocument.spreadsheet" ns0:full-path="/"/>
  <ns0:file-entry ns0:media-type="text/xml" ns0:full-path="content.xml"/>
</ns0:manifest>
</file>

<file path=content.xml><?xml version="1.0" encoding="utf-8"?>
<ns0:document-content xmlns:ns0="urn:oasis:names:tc:opendocument:xmlns:office:1.0">
  <ns0:body>
    <ns0:spreadsheet>
      <ns1:table xmlns:ns1="urn:oasis:names:tc:opendocument:xmlns:table:1.0" ns1:name="Inventario">
        <ns1:table-row>
          <ns1:table-cell>
            <ns1:p xmlns:ns1="urn:oasis:names:tc:opendocument:xmlns:text:1.0">clave_prod_serv</ns1:p>
          </ns1:table-cell>
          <ns1:table-cell>
            <ns1:p xmlns:ns1="urn:oasis:names:tc:opendocument:xmlns:text:1.0">descripcion</ns1:p>
          </ns1:table-cell>
          <ns1:table-cell>
            <ns1:p xmlns:ns1="urn:oasis:names:tc:opendocument:xmlns:text:1.0">cantidad</ns1:p>
          </ns1:table-cell>
          <ns1:table-cell>
            <ns1:p xmlns:ns1="urn:oasis:names:tc:opendocument:xmlns:text:1.0">valor_unitario</ns1:p>
          </ns1:table-cell>
          <ns1:table-cell>
            <ns1:p xmlns:ns1="urn:oasis:names:tc:opendocument:xmlns:text:1.0">importe</ns1:p>
          </ns1:table-cell>
          <ns1:table-cell>
            <ns1:p xmlns:ns1="urn:oasis:names:tc:opendocument:xmlns:text:1.0">tasa_iva</ns1:p>
          </ns1:table-cell>
        </ns1:table-row>
        <ns1:table-row>
          <ns1:table-cell>
            <ns1:p xmlns:ns1="urn:oasis:names:tc:opendocument:xmlns:text:1.0">50202301</ns1:p>
          </ns1:table-cell>
          <ns1:table-cell>
            <ns1:p xmlns:ns1="urn:oasis:names:tc:opendocument:xmlns:text:1.0">Maíz blanco grano (ton)</ns1:p>
          </ns1:table-cell>
          <ns1:table-cell>
            <ns1:p xmlns:ns1="urn:oasis:names:tc:opendocument:xmlns:text:1.0">10</ns1:p>
          </ns1:table-cell>
          <ns1:table-cell>
            <ns1:p xmlns:ns1="urn:oasis:names:tc:opendocument:xmlns:text:1.0">4200.00</ns1:p>
          </ns1:table-cell>
          <ns1:table-cell>
            <ns1:p xmlns:ns1="urn:oasis:names:tc:opendocument:xmlns:text:1.0">42000.00</ns1:p>
          </ns1:table-cell>
          <ns1:table-cell>
            <ns1:p xmlns:ns1="urn:oasis:names:tc:opendocument:xmlns:text:1.0">Exento</ns1:p>
          </ns1:table-cell>
        </ns1:table-row>
        <ns1:table-row>
          <ns1:table-cell>
            <ns1:p xmlns:ns1="urn:oasis:names:tc:opendocument:xmlns:text:1.0">50202302</ns1:p>
          </ns1:table-cell>
          <ns1:table-cell>
            <ns1:p xmlns:ns1="urn:oasis:names:tc:opendocument:xmlns:text:1.0">Frijol negro (ton)</ns1:p>
          </ns1:table-cell>
          <ns1:table-cell>
            <ns1:p xmlns:ns1="urn:oasis:names:tc:opendocument:xmlns:text:1.0">5</ns1:p>
          </ns1:table-cell>
          <ns1:table-cell>
            <ns1:p xmlns:ns1="urn:oasis:names:tc:opendocument:xmlns:text:1.0">9800.00</ns1:p>
          </ns1:table-cell>
          <ns1:table-cell>
            <ns1:p xmlns:ns1="urn:oasis:names:tc:opendocument:xmlns:text:1.0">49000.00</ns1:p>
          </ns1:table-cell>
          <ns1:table-cell>
            <ns1:p xmlns:ns1="urn:oasis:names:tc:opendocument:xmlns:text:1.0">Exento</ns1:p>
          </ns1:table-cell>
        </ns1:table-row>
        <ns1:table-row>
          <ns1:table-cell>
            <ns1:p xmlns:ns1="urn:oasis:names:tc:opendocument:xmlns:text:1.0">50202201</ns1:p>
          </ns1:table-cell>
          <ns1:table-cell>
            <ns1:p xmlns:ns1="urn:oasis:names:tc:opendocument:xmlns:text:1.0">Aceite vegetal refinado</ns1:p>
          </ns1:table-cell>
          <ns1:table-cell>
            <ns1:p xmlns:ns1="urn:oasis:names:tc:opendocument:xmlns:text:1.0">100</ns1:p>
          </ns1:table-cell>
          <ns1:table-cell>
            <ns1:p xmlns:ns1="urn:oasis:names:tc:opendocument:xmlns:text:1.0">38.50</ns1:p>
          </ns1:table-cell>
          <ns1:table-cell>
            <ns1:p xmlns:ns1="urn:oasis:names:tc:opendocument:xmlns:text:1.0">3850.00</ns1:p>
          </ns1:table-cell>
          <ns1:table-cell>
            <ns1:p xmlns:ns1="urn:oasis:names:tc:opendocument:xmlns:text:1.0">0</ns1:p>
          </ns1:table-cell>
        </ns1:table-row>
        <ns1:table-row>
          <ns1:table-cell>
            <ns1:p xmlns:ns1="urn:oasis:names:tc:opendocument:xmlns:text:1.0">50202302</ns1:p>
          </ns1:table-cell>
          <ns1:table-cell>
            <ns1:p xmlns:ns1="urn:oasis:names:tc:opendocument:xmlns:text:1.0">Atún enlatado (caja 24)</ns1:p>
          </ns1:table-cell>
          <ns1:table-cell>
            <ns1:p xmlns:ns1="urn:oasis:names:tc:opendocument:xmlns:text:1.0">200</ns1:p>
          </ns1:table-cell>
          <ns1:table-cell>
            <ns1:p xmlns:ns1="urn:oasis:names:tc:opendocument:xmlns:text:1.0">145.00</ns1:p>
          </ns1:table-cell>
          <ns1:table-cell>
            <ns1:p xmlns:ns1="urn:oasis:names:tc:opendocument:xmlns:text:1.0">29000.00</ns1:p>
          </ns1:table-cell>
          <ns1:table-cell>
            <ns1:p xmlns:ns1="urn:oasis:names:tc:opendocument:xmlns:text:1.0"/>
          </ns1:table-cell>
        </ns1:table-row>
        <ns1:table-row>
          <ns1:table-cell>
            <ns1:p xmlns:ns1="urn:oasis:names:tc:opendocument:xmlns:text:1.0">50202201</ns1:p>
          </ns1:table-cell>
          <ns1:table-cell>
            <ns1:p xmlns:ns1="urn:oasis:names:tc:opendocument:xmlns:text:1.0">Harina de trigo (saco)</ns1:p>
          </ns1:table-cell>
          <ns1:table-cell>
            <ns1:p xmlns:ns1="urn:oasis:names:tc:opendocument:xmlns:text:1.0">50</ns1:p>
          </ns1:table-cell>
          <ns1:table-cell>
            <ns1:p xmlns:ns1="urn:oasis:names:tc:opendocument:xmlns:text:1.0">320.00</ns1:p>
          </ns1:table-cell>
          <ns1:table-cell>
            <ns1:p xmlns:ns1="urn:oasis:names:tc:opendocument:xmlns:text:1.0">16000.00</ns1:p>
          </ns1:table-cell>
          <ns1:table-cell>
            <ns1:p xmlns:ns1="urn:oasis:names:tc:opendocument:xmlns:text:1.0">0.08</ns1:p>
          </ns1:table-cell>
        </ns1:table-row>
      </ns1:table>
    </ns0:spreadsheet>
  </ns0:body>
</ns0:document-content>
</file>